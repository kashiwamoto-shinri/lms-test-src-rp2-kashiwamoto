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06cm" fo:break-before="auto" style:use-optimal-row-height="true"/>
    </style:style>
    <style:style style:name="ro22" style:family="table-row">
      <style:table-row-properties style:row-height="2.081cm" fo:break-before="auto" style:use-optimal-row-height="true"/>
    </style:style>
    <style:style style:name="ro23" style:family="table-row">
      <style:table-row-properties style:row-height="1.72cm" fo:break-before="auto" style:use-optimal-row-height="true"/>
    </style:style>
    <style:style style:name="ro24" style:family="table-row">
      <style:table-row-properties style:row-height="1.083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7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16382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16380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16380"/>
        </table:table-row>
        <table:table-row table:style-name="ro6">
          <table:table-cell/>
          <table:table-cell table:style-name="ce120" office:value-type="date" office:date-value="2026-06-23" calcext:value-type="date">
            <text:p>2026/06/23</text:p>
          </table:table-cell>
          <table:table-cell table:style-name="ce128" office:value-type="string" calcext:value-type="string">
            <text:p>柏本真理</text:p>
          </table:table-cell>
          <table:table-cell table:style-name="ce128" office:value-type="string" calcext:value-type="string">
            <text:p>新規作成</text:p>
          </table:table-cell>
          <table:table-cell table:number-columns-repeated="16380"/>
        </table:table-row>
        <table:table-row table:style-name="ro7" table:number-rows-repeated="2">
          <table:table-cell/>
          <table:table-cell table:style-name="ce120"/>
          <table:table-cell table:style-name="ce128" table:number-columns-repeated="2"/>
          <table:table-cell table:number-columns-repeated="16380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16329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　　　　　　　　　　　　　　　　　　　　　　　　　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2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DBに登録されていない</text:span>入力値を入力し、ログインボタンを押下する。　　　　　　　　　　　　　　　　　　　　　　　　　　　　　　　　　　　・入力値　　　　　　　　　　　　　　　　　　　　　　　　　　　　　　　　ログインID:StudentZZ99 　　　　　　　　　　　　　　　　　　　　　　　　パスワード:StudentZZ99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「* ログインに失敗しました。」とエラーメッセージ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3" table:style-name="ta5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3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4" table:style-name="ta6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5" table:style-name="ta7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23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以下の入力値を入力し、検索ボタンを押下する。　　　　　　　　　　　　　　　　　　　　　　　　　　　　　　　　　　　　　　　　　　　　　　　　　　・入力値　　　　　　　　　　　　　　　　　　　　　　　　　　　　　　　　キャンセル　　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キャンセルという文字を含む検索結果だけが表示される。 <text:s text:c="32"/>・検索結果にキャンセル料・途中退校についての質問が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24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クリアボタンを押下する。　　　　　　　　　　　　　　　　　　　　　　　　　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入力したキャンセルという文字が消去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24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　カテゴリ検索欄の研修関係ボタン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該当する結果の質問だけが表示される。　　　　　　　　　　　　　　　　　　　　　　　　・キャンセル料・途中退校についての質問が表示されている　　　　　　　　　　　　　　　・研修の申し込みはどのようにすれば良いですか？という質問が表示されている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3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　検索結果のキャンセル料・途中退校についての質問ボタン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質問の回答が表示される。　　　　　　　　　　　　　　　　　　　　　　　　　　　　　　・受講者の退職や解雇等、やむを得ない事情による途中終了に関してなど、事情をお伺いした上で、協議という形を取らせて頂きます。弊社営業担当までご相談下さい。という回答が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7" table:style-name="ta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8" table:style-name="ta10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9" table:style-name="ta11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0" table:style-name="ta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</text:span><text:span text:style-name="T1">管理者アカウントでログイン</text:span></text:p>
              <text:p text:style-name="P1"><text:span text:style-name="T1"/></text:p>
              <text:p text:style-name="P1"><text:span text:style-name="T1">②</text:span><text:span text:style-name="T1">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</text:span><text:span text:style-name="T1">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</text:span><text:span text:style-name="T1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1" table:style-name="ta1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2" table:style-name="ta1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3" table:style-name="ta1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4" table:style-name="ta1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5" table:style-name="ta1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6" table:style-name="ta1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7" table:style-name="ta1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23T11:51:07.110000000</dc:date>
    <meta:print-date>2025-02-21T15:24:43</meta:print-date>
    <meta:editing-duration>PT9H30M</meta:editing-duration>
    <meta:editing-cycles>55</meta:editing-cycles>
    <meta:generator>LibreOffice/7.4.3.2$Windows_X86_64 LibreOffice_project/1048a8393ae2eeec98dff31b5c133c5f1d08b890</meta:generator>
    <meta:document-statistic meta:table-count="19" meta:cell-count="514" meta:object-count="0"/>
  </office:meta>
</office:document-meta>
</file>