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ro23" style:family="table-row">
      <style:table-row-properties style:row-height="1.72cm" fo:break-before="auto" style:use-optimal-row-height="true"/>
    </style:style>
    <style:style style:name="ro24" style:family="table-row">
      <style:table-row-properties style:row-height="1.083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16380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20" office:value-type="date" office:date-value="2026-06-23" calcext:value-type="date">
            <text:p>2026/06/23</text:p>
          </table:table-cell>
          <table:table-cell table:style-name="ce128" office:value-type="string" calcext:value-type="string">
            <text:p>柏本真理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16380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3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以下の入力値を入力し、検索ボタンを押下する。　　　　　　　　　　　　　　　　　　　　　　　　　　　　　　　　　　　　　　　　　　　　　　　　　　・入力値　　　　　　　　　　　　　　　　　　　　　　　　　　　　　　　　キャンセル　　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キャンセルという文字を含む検索結果だけ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4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クリアボタンを押下する。　　　　　　　　　　　　　　　　　　　　　　　　　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入力したキャンセルという文字が消去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　カテゴリ検索欄の研修関係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キャンセル料・途中退校について、研修の申し込みはどのようにすれば良いですか？の二つの結果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　検索結果のキャンセル料・途中退校についての質問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質問の解答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3T09:52:10.338000000</dc:date>
    <meta:print-date>2025-02-21T15:24:43</meta:print-date>
    <meta:editing-duration>PT8H55M41S</meta:editing-duration>
    <meta:editing-cycles>49</meta:editing-cycles>
    <meta:generator>LibreOffice/7.4.3.2$Windows_X86_64 LibreOffice_project/1048a8393ae2eeec98dff31b5c133c5f1d08b890</meta:generator>
    <meta:document-statistic meta:table-count="19" meta:cell-count="514" meta:object-count="0"/>
  </office:meta>
</office:document-meta>
</file>