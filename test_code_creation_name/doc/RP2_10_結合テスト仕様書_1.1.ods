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402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806cm" fo:break-before="auto" style:use-optimal-row-height="true"/>
    </style:style>
    <style:style style:name="ro22" style:family="table-row">
      <style:table-row-properties style:row-height="2.081cm" fo:break-before="auto" style:use-optimal-row-height="true"/>
    </style:style>
    <style:style style:name="ro23" style:family="table-row">
      <style:table-row-properties style:row-height="1.72cm" fo:break-before="auto" style:use-optimal-row-height="true"/>
    </style:style>
    <style:style style:name="ro24" style:family="table-row">
      <style:table-row-properties style:row-height="1.083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ＭＳ 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7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ＭＳ ゴシック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05"/>
        <table:table-column table:style-name="co2" table:number-columns-repeated="2" table:default-cell-style-name="ce105"/>
        <table:table-column table:style-name="co3" table:default-cell-style-name="ce105"/>
        <table:table-column table:style-name="co4" table:default-cell-style-name="ce131"/>
        <table:table-column table:style-name="co5" table:number-columns-repeated="252" table:default-cell-style-name="ce131"/>
        <table:table-column table:style-name="co5" table:number-columns-repeated="16127" table:default-cell-style-name="Default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115" office:value-type="string" calcext:value-type="string">
            <text:p>関係者外秘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/>
          <table:table-cell table:style-name="ce116" office:value-type="string" calcext:value-type="string">
            <text:p>LMS学習管理システム</text:p>
          </table:table-cell>
          <table:table-cell table:number-columns-repeated="16382"/>
        </table:table-row>
        <table:table-row table:style-name="ro4">
          <table:table-cell/>
          <table:table-cell table:style-name="ce116" office:value-type="string" calcext:value-type="string">
            <text:p>結合テスト仕様書</text:p>
          </table:table-cell>
          <table:table-cell table:number-columns-repeated="16382"/>
        </table:table-row>
        <table:table-row table:style-name="ro1" table:number-rows-repeated="9">
          <table:table-cell table:number-columns-repeated="16384"/>
        </table:table-row>
        <table:table-row table:style-name="ro5">
          <table:table-cell/>
          <table:table-cell table:style-name="ce117" office:value-type="string" calcext:value-type="string">
            <text:p>更新履歴</text:p>
          </table:table-cell>
          <table:table-cell table:style-name="ce117" table:number-columns-repeated="2"/>
          <table:table-cell table:number-columns-repeated="16380"/>
        </table:table-row>
        <table:table-row table:style-name="ro6">
          <table:table-cell/>
          <table:table-cell table:style-name="ce118" office:value-type="string" calcext:value-type="string">
            <text:p>年月日</text:p>
          </table:table-cell>
          <table:table-cell table:style-name="ce118" office:value-type="string" calcext:value-type="string">
            <text:p>担当者</text:p>
          </table:table-cell>
          <table:table-cell table:style-name="ce118" office:value-type="string" calcext:value-type="string">
            <text:p>内容</text:p>
          </table:table-cell>
          <table:table-cell table:number-columns-repeated="16380"/>
        </table:table-row>
        <table:table-row table:style-name="ro6">
          <table:table-cell/>
          <table:table-cell table:style-name="ce120" office:value-type="date" office:date-value="2026-06-23" calcext:value-type="date">
            <text:p>2026/06/23</text:p>
          </table:table-cell>
          <table:table-cell table:style-name="ce128" office:value-type="string" calcext:value-type="string">
            <text:p>柏本真理</text:p>
          </table:table-cell>
          <table:table-cell table:style-name="ce128" office:value-type="string" calcext:value-type="string">
            <text:p>新規作成</text:p>
          </table:table-cell>
          <table:table-cell table:number-columns-repeated="16380"/>
        </table:table-row>
        <table:table-row table:style-name="ro7" table:number-rows-repeated="2">
          <table:table-cell/>
          <table:table-cell table:style-name="ce120"/>
          <table:table-cell table:style-name="ce128" table:number-columns-repeated="2"/>
          <table:table-cell table:number-columns-repeated="16380"/>
        </table:table-row>
        <table:table-row table:style-name="ro7" table:number-rows-repeated="5">
          <table:table-cell/>
          <table:table-cell table:style-name="ce117" table:number-columns-repeated="3"/>
          <table:table-cell table:number-columns-repeated="16380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"/>
          <table:table-cell table:number-columns-repeated="1638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48" table:default-cell-style-name="ce134"/>
        <table:table-column table:style-name="co7" table:default-cell-style-name="ce176"/>
        <table:table-column table:style-name="co6" table:number-columns-repeated="199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135" office:value-type="string" calcext:value-type="string">
            <text:p>テストケース一覧</text:p>
          </table:table-cell>
          <table:table-cell table:style-name="ce135"/>
          <table:table-cell table:style-name="ce139"/>
          <table:table-cell table:style-name="ce142" table:number-columns-repeated="5"/>
          <table:table-cell table:style-name="ce133" table:number-columns-repeated="48"/>
          <table:table-cell table:style-name="ce177"/>
          <table:table-cell table:style-name="ce181" table:number-columns-repeated="16326"/>
        </table:table-row>
        <table:table-row table:style-name="ro1">
          <table:table-cell table:number-columns-repeated="54"/>
          <table:table-cell table:style-name="ce174" office:value-type="string" calcext:value-type="string">
            <text:p>※テストケースは正常系と準正常系に限り行う。</text:p>
          </table:table-cell>
          <table:table-cell table:number-columns-repeated="16329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ケース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45"/>
          <table:covered-table-cell table:style-name="ce147"/>
          <table:table-cell table:style-name="ce21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45"/>
          <table:covered-table-cell table:style-name="ce147"/>
          <table:table-cell table:style-name="ce21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45"/>
          <table:covered-table-cell table:style-name="ce147"/>
          <table:table-cell table:number-columns-repeated="2"/>
          <table:table-cell table:style-name="ce178" office:value-type="string" calcext:value-type="string">
            <text:p>難易度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150"/>
          <table:covered-table-cell table:style-name="ce16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151"/>
          <table:covered-table-cell table:style-name="ce16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152"/>
          <table:covered-table-cell table:style-name="ce16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15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10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15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155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2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156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13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157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4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158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6326"/>
        </table:table-row>
        <table:table-row table:style-name="ro15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159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6">
          <table:table-cell/>
          <table:table-cell table:style-name="ce13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16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7">
          <table:table-cell/>
          <table:table-cell table:style-name="ce13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16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8">
          <table:table-cell/>
          <table:table-cell table:style-name="ce13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162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6326"/>
        </table:table-row>
        <table:table-row table:style-name="ro19">
          <table:table-cell/>
          <table:table-cell table:style-name="ce13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163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A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164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50"/>
          <table:table-cell table:number-columns-repeated="2"/>
          <table:table-cell table:style-name="ce179" office:value-type="string" calcext:value-type="string">
            <text:p>C</text:p>
          </table:table-cell>
          <table:table-cell table:number-columns-repeated="16326"/>
        </table:table-row>
        <table:table-row table:style-name="ro20">
          <table:table-cell/>
          <table:table-cell table:style-name="ce13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65"/>
          <table:covered-table-cell table:style-name="ce170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9">
          <table:table-cell/>
          <table:table-cell table:style-name="ce13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37"/>
          <table:table-cell table:style-name="ce14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6"/>
          <table:covered-table-cell table:style-name="ce148"/>
          <table:table-cell table:style-name="ce149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166"/>
          <table:covered-table-cell table:style-name="ce171"/>
          <table:table-cell table:style-name="ce50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73"/>
          <table:covered-table-cell table:style-name="ce175"/>
          <table:table-cell table:number-columns-repeated="2"/>
          <table:table-cell table:style-name="ce179" office:value-type="string" calcext:value-type="string">
            <text:p>B</text:p>
          </table:table-cell>
          <table:table-cell table:number-columns-repeated="1632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　　　　　　　　　　　　　　　　　　　　　　　　　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" table:number-columns-spanned="3" table:number-rows-spanned="1"/>
          <table:covered-table-cell table:number-columns-repeated="2" table:style-name="ce72" table:content-validation-name="val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2" table:style-name="ta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2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DBに登録されていない</text:span>入力値を入力し、ログインボタンを押下する。　　　　　　　　　　　　　　　　　　　　　　　　　　　　　　　　　　　・入力値　　　　　　　　　　　　　　　　　　　　　　　　　　　　　　　　ログインID:StudentZZ99 　　　　　　　　　　　　　　　　　　　　　　　　パスワード:StudentZZ99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「* ログインに失敗しました。」とエラーメッセージが表示される。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19" calcext:value-type="date" table:number-columns-spanned="5" table:number-rows-spanned="1">
            <text:p>2026/6/19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2" table:number-columns-spanned="3" table:number-rows-spanned="1"/>
          <table:covered-table-cell table:number-columns-repeated="2" table:style-name="ce72" table:content-validation-name="val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3" table:style-name="ta5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3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3" table:number-columns-spanned="3" table:number-rows-spanned="1"/>
          <table:covered-table-cell table:number-columns-repeated="2" table:style-name="ce72" table:content-validation-name="val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4" table:style-name="ta6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4" table:number-columns-spanned="3" table:number-rows-spanned="1"/>
          <table:covered-table-cell table:number-columns-repeated="2" table:style-name="ce72" table:content-validation-name="val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5" table:style-name="ta7">
        <office:forms form:automatic-focus="false" form:apply-design-mode="false"/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23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よくある質問画面　　　　　　　　　　　　　　　　　　　　　　　　　　　以下の入力値を入力し、検索ボタンを押下する。　　　　　　　　　　　　　　　　　　　　　　　　　　　　　　　　　　　　　　　　　　　　　　　　　　・入力値　　　　　　　　　　　　　　　　　　　　　　　　　　　　　　　　キャンセル　　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キャンセルという文字を含む検索結果だけが表示される。 <text:s text:c="32"/>・検索結果にキャンセル料・途中退校についての質問が表示され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24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よくある質問画面　　　　　　　　　　　　　　　　　　　　　　　　　　　クリアボタンを押下する。　　　　　　　　　　　　　　　　　　　　　　　　　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入力したキャンセルという文字が消去される。　　　　　　　　　　　　　　　　　　　　　 ・キャンセルと入力されたテキストボックスが空白にな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2" calcext:value-type="date" table:number-columns-spanned="5" table:number-rows-spanned="1">
            <text:p>2026/6/22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5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5" table:number-columns-spanned="3" table:number-rows-spanned="1"/>
          <table:covered-table-cell table:number-columns-repeated="2" table:style-name="ce72" table:content-validation-name="val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6" table:style-name="ta8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2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webブラウザにてhttp://localhost:8080/lmsと検索する。　　　</text:p>
          </table:table-cell>
          <table:covered-table-cell table:number-columns-repeated="21" table:style-name="ce60"/>
          <table:covered-table-cell table:style-name="ce62"/>
          <table:table-cell table:style-name="ce66" office:value-type="string" calcext:value-type="string" table:number-columns-spanned="27" table:number-rows-spanned="1">
            <text:p><text:span text:style-name="T5">トップページにアクセスし、</text:span><text:span text:style-name="T6">ログイン画面が表示される。　　　　　　　　　　　　　　・画面上部にログインと表示されている</text:span>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22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<text:span text:style-name="T7">・ログイン画面　　　　　　　　　　　　　　　　　　　　　　　　　　　　　　以下の</text:span><text:span text:style-name="T8">初回ログイン済みの</text:span><text:span text:style-name="T6">入力値を入力し、ログインボタンを押下する。　　　　　　　　　　　　　　　　　　　　　　　　　　　　　　　　　　　　　・入力値　　　　　　　　　　　　　　　　　　　　　　　　　　　　　　　　ログインID:StudentAA01　　　　　　　　　　　　　　　　　　　　　　　　パスワード:Student01</text:span>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<text:span text:style-name="T7">ログインに成功し、コース詳細画面が表示される。　　　　　　　　　　　　　　　　　　　　　　　　　　　　　　　　　　　　　　　　　　　　　　　　　　　　　　　　　　　　　ログイン成功後の画面　　　　　　　　　　　　　　　　　　　　　　　　　　　　　　　　・ログイン中のユーザーが画面右上に表示される　                                   　・画面上部にDEMOコース2022年10月1日(土)～2022年10月31日(月)と表示される</text:span>　　　　　　　　　　　　　　　　　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6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コース詳細画面　　　　　　　　　　　　　　　　　　　　　　　　　　　　画面上部の機能ボタンを押下→ヘルプ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ヘルプ画面が表示される。　　　　　　　　　　　　　　　　　　　　　　　　　　　　　　・画面上部にヘルプ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6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ヘルプ画面　　　　　　　　　　　　　　　　　　　　　　　　　　　　　　よくある質問リンク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よくある質問画面が表示される。　　　　　　　　　　　　　　　　　　　　　　　　　　　・画面上部によくある質問と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24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よくある質問画面　　　　　　　　　　　　　　　　　　　　　　　　　　　　カテゴリ検索欄の研修関係ボタン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該当する結果の質問だけが表示される。　　　　　　　　　　　　　　　　　　　　　　　　・キャンセル料・途中退校についての質問が表示されている　　　　　　　　　　　　　　　・研修の申し込みはどのようにすれば良いですか？という質問が表示されている　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3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office:value-type="string" calcext:value-type="string" table:number-columns-spanned="23" table:number-rows-spanned="1">
            <text:p>・よくある質問画面　　　　　　　　　　　　　　　　　　　　　　　　　　　　検索結果のキャンセル料・途中退校についての質問ボタンを押下する。</text:p>
          </table:table-cell>
          <table:covered-table-cell table:number-columns-repeated="22" table:style-name="ce66"/>
          <table:table-cell table:style-name="ce66" office:value-type="string" calcext:value-type="string" table:number-columns-spanned="27" table:number-rows-spanned="1">
            <text:p>質問の回答が表示される。　　　　　　　　　　　　　　　　　　　　　　　　　　　　　　・受講者の退職や解雇等、やむを得ない事情による途中終了に関してなど、事情をお伺いした上で、協議という形を取らせて頂きます。弊社営業担当までご相談下さい。という回答が表示されている</text:p>
          </table:table-cell>
          <table:covered-table-cell table:number-columns-repeated="25" table:style-name="ce60"/>
          <table:covered-table-cell table:style-name="ce62"/>
          <table:table-cell table:style-name="ce119" office:value-type="date" office:date-value="2026-06-23" calcext:value-type="date" table:number-columns-spanned="5" table:number-rows-spanned="1">
            <text:p>2026/6/23</text:p>
          </table:table-cell>
          <table:covered-table-cell table:number-columns-repeated="4" table:style-name="ce119"/>
          <table:table-cell table:style-name="ce72" office:value-type="string" calcext:value-type="string" table:number-columns-spanned="4" table:number-rows-spanned="1">
            <text:p>柏本真理</text:p>
          </table:table-cell>
          <table:covered-table-cell table:number-columns-repeated="3" table:style-name="ce72"/>
          <table:table-cell table:style-name="ce72" table:content-validation-name="val6" office:value-type="string" calcext:value-type="string" table:number-columns-spanned="3" table:number-rows-spanned="1">
            <text:p>OK</text:p>
          </table:table-cell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6" table:number-columns-spanned="3" table:number-rows-spanned="1"/>
          <table:covered-table-cell table:number-columns-repeated="2" table:style-name="ce72" table:content-validation-name="val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7" table:style-name="ta9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7" table:number-columns-spanned="3" table:number-rows-spanned="1"/>
          <table:covered-table-cell table:number-columns-repeated="2" table:style-name="ce72" table:content-validation-name="val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8" table:style-name="ta10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8" table:number-columns-spanned="3" table:number-rows-spanned="1"/>
          <table:covered-table-cell table:number-columns-repeated="2" table:style-name="ce72" table:content-validation-name="val8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9" table:style-name="ta11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9" table:number-columns-spanned="3" table:number-rows-spanned="1"/>
          <table:covered-table-cell table:number-columns-repeated="2" table:style-name="ce72" table:content-validation-name="val9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0" table:style-name="ta12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3" table:number-columns-spanned="5" table:number-rows-spanned="1"/>
          <table:covered-table-cell table:number-columns-repeated="4" table:style-name="ce73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>
            <office:annotation office:display="true" draw:style-name="gr1" draw:text-style-name="P2" svg:width="11.652cm" svg:height="6.512cm" svg:x="22.75cm" svg:y="7.492cm" draw:caption-point-x="-8.52cm" draw:caption-point-y="-3.194cm">
              <dc:date>2026-06-18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</text:span><text:span text:style-name="T1">管理者アカウントでログイン</text:span></text:p>
              <text:p text:style-name="P1"><text:span text:style-name="T1"/></text:p>
              <text:p text:style-name="P1"><text:span text:style-name="T1">②</text:span><text:span text:style-name="T1">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</text:span><text:span text:style-name="T1">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</text:span><text:span text:style-name="T1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0" table:number-columns-spanned="3" table:number-rows-spanned="1"/>
          <table:covered-table-cell table:number-columns-repeated="2" table:style-name="ce72" table:content-validation-name="val10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1" table:style-name="ta13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3" table:number-columns-spanned="5" table:number-rows-spanned="1"/>
          <table:covered-table-cell table:number-columns-repeated="4" table:style-name="ce73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1" table:number-columns-spanned="3" table:number-rows-spanned="1"/>
          <table:covered-table-cell table:number-columns-repeated="2" table:style-name="ce72" table:content-validation-name="val1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2" table:style-name="ta14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73" table:number-columns-spanned="5" table:number-rows-spanned="1"/>
          <table:covered-table-cell table:number-columns-repeated="4" table:style-name="ce73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2" table:number-columns-spanned="3" table:number-rows-spanned="1"/>
          <table:covered-table-cell table:number-columns-repeated="2" table:style-name="ce72" table:content-validation-name="val1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3" table:style-name="ta15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3" table:number-columns-spanned="3" table:number-rows-spanned="1"/>
          <table:covered-table-cell table:number-columns-repeated="2" table:style-name="ce72" table:content-validation-name="val1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4" table:style-name="ta16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4" table:number-columns-spanned="3" table:number-rows-spanned="1"/>
          <table:covered-table-cell table:number-columns-repeated="2" table:style-name="ce72" table:content-validation-name="val1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5" table:style-name="ta17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5" table:number-columns-spanned="3" table:number-rows-spanned="1"/>
          <table:covered-table-cell table:number-columns-repeated="2" table:style-name="ce72" table:content-validation-name="val1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6" table:style-name="ta18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6" table:number-columns-spanned="3" table:number-rows-spanned="1"/>
          <table:covered-table-cell table:number-columns-repeated="2" table:style-name="ce72" table:content-validation-name="val1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7" table:style-name="ta19">
        <table:table-column table:style-name="co6" table:number-columns-repeated="4" table:default-cell-style-name="ce134"/>
        <table:table-column table:style-name="co6" table:number-columns-repeated="5" table:default-cell-style-name="ce141"/>
        <table:table-column table:style-name="co6" table:number-columns-repeated="57" table:default-cell-style-name="ce134"/>
        <table:table-column table:style-name="co6" table:number-columns-repeated="191" table:default-cell-style-name="ce180"/>
        <table:table-column table:style-name="co6" table:number-columns-repeated="16127" table:default-cell-style-name="Default"/>
        <table:table-row table:style-name="ro1">
          <table:table-cell table:style-name="ce132"/>
          <table:table-cell table:number-columns-repeated="16383"/>
        </table:table-row>
        <table:table-row table:style-name="ro7">
          <table:table-cell table:style-name="ce133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39"/>
          <table:table-cell table:style-name="ce142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133" table:number-columns-repeated="39"/>
          <table:table-cell table:style-name="ce181" table:number-columns-repeated="16318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36" office:value-type="string" calcext:value-type="string" table:number-columns-spanned="3" table:number-rows-spanned="1">
            <text:p>テストNo</text:p>
          </table:table-cell>
          <table:covered-table-cell table:style-name="ce138"/>
          <table:covered-table-cell table:style-name="ce140"/>
          <table:table-cell table:style-name="ce21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5"/>
          <table:covered-table-cell table:style-name="ce147"/>
          <table:table-cell table:style-name="ce21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5"/>
          <table:covered-table-cell table:style-name="ce147"/>
          <table:table-cell table:style-name="ce21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5"/>
          <table:covered-table-cell table:style-name="ce147"/>
          <table:table-cell table:style-name="ce21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5"/>
          <table:covered-table-cell table:style-name="ce147"/>
          <table:table-cell table:style-name="ce21" office:value-type="string" calcext:value-type="string" table:number-columns-spanned="3" table:number-rows-spanned="1">
            <text:p>合否</text:p>
          </table:table-cell>
          <table:covered-table-cell table:style-name="ce145"/>
          <table:covered-table-cell table:style-name="ce147"/>
          <table:table-cell table:number-columns-repeated="16318"/>
        </table:table-row>
        <table:table-row table:style-name="ro1">
          <table:table-cell/>
          <table:table-cell table:style-name="ce13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5" table:style-name="ce60"/>
          <table:covered-table-cell table:style-name="ce62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2" table:style-name="ce66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>
          <table:table-cell/>
          <table:table-cell table:style-name="ce13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7"/>
          <table:table-cell table:style-name="ce66" table:number-columns-spanned="23" table:number-rows-spanned="1"/>
          <table:covered-table-cell table:number-columns-repeated="21" table:style-name="ce60"/>
          <table:covered-table-cell table:style-name="ce62"/>
          <table:table-cell table:style-name="ce66" table:number-columns-spanned="27" table:number-rows-spanned="1"/>
          <table:covered-table-cell table:number-columns-repeated="26" table:style-name="ce66"/>
          <table:table-cell table:style-name="ce119" table:number-columns-spanned="5" table:number-rows-spanned="1"/>
          <table:covered-table-cell table:number-columns-repeated="4" table:style-name="ce119"/>
          <table:table-cell table:style-name="ce72" table:number-columns-spanned="4" table:number-rows-spanned="1"/>
          <table:covered-table-cell table:number-columns-repeated="3" table:style-name="ce72"/>
          <table:table-cell table:style-name="ce72" table:content-validation-name="val17" table:number-columns-spanned="3" table:number-rows-spanned="1"/>
          <table:covered-table-cell table:number-columns-repeated="2" table:style-name="ce72" table:content-validation-name="val1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23T12:47:07.646000000</dc:date>
    <meta:print-date>2025-02-21T15:24:43</meta:print-date>
    <meta:editing-duration>PT9H30M56S</meta:editing-duration>
    <meta:editing-cycles>56</meta:editing-cycles>
    <meta:generator>LibreOffice/7.4.3.2$Windows_X86_64 LibreOffice_project/1048a8393ae2eeec98dff31b5c133c5f1d08b890</meta:generator>
    <meta:document-statistic meta:table-count="19" meta:cell-count="514" meta:object-count="0"/>
  </office:meta>
</office:document-meta>
</file>